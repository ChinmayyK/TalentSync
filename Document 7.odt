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margin-top="0.2236in" fo:margin-bottom="0.2236in"/>
    </style:style>
    <style:style style:name="T2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3" style:parent-style-name="Heading2" style:family="paragraph">
      <style:paragraph-properties fo:margin-top="0.2076in" fo:margin-bottom="0.2076in"/>
    </style:style>
    <style:style style:name="T4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5" style:parent-style-name="Heading2" style:family="paragraph">
      <style:paragraph-properties fo:margin-top="0.2076in" fo:margin-bottom="0.2076in"/>
    </style:style>
    <style:style style:name="T6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7" style:parent-style-name="Normal" style:family="paragraph">
      <style:paragraph-properties fo:margin-top="0.1666in" fo:margin-bottom="0.1666in"/>
    </style:style>
    <style:style style:name="T8" style:parent-style-name="DefaultParagraphFont" style:family="text">
      <style:text-properties style:font-name="Aptos" style:font-name-asian="Aptos" style:font-name-complex="Aptos"/>
    </style:style>
    <style:style style:name="T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0" style:parent-style-name="Normal" style:family="paragraph">
      <style:paragraph-properties fo:margin-top="0.1666in" fo:margin-bottom="0.1666in"/>
    </style:style>
    <style:style style:name="T11" style:parent-style-name="DefaultParagraphFont" style:family="text">
      <style:text-properties style:font-name="Aptos" style:font-name-asian="Aptos" style:font-name-complex="Aptos"/>
    </style:style>
    <style:style style:name="P12" style:parent-style-name="ListParagraph" style:family="paragraph">
      <style:paragraph-properties fo:margin-top="0.1666in" fo:margin-bottom="0.1666in"/>
    </style:style>
    <style:style style:name="T1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" style:parent-style-name="DefaultParagraphFont" style:family="text">
      <style:text-properties style:font-name="Aptos" style:font-name-asian="Aptos" style:font-name-complex="Aptos"/>
    </style:style>
    <style:style style:name="P15" style:parent-style-name="ListParagraph" style:family="paragraph">
      <style:paragraph-properties fo:margin-top="0.1666in" fo:margin-bottom="0.1666in"/>
    </style:style>
    <style:style style:name="T1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7" style:parent-style-name="DefaultParagraphFont" style:family="text">
      <style:text-properties style:font-name="Aptos" style:font-name-asian="Aptos" style:font-name-complex="Aptos"/>
    </style:style>
    <style:style style:name="P18" style:parent-style-name="Normal" style:family="paragraph">
      <style:paragraph-properties fo:margin-top="0.1666in" fo:margin-bottom="0.1666in"/>
    </style:style>
    <style:style style:name="T19" style:parent-style-name="DefaultParagraphFont" style:family="text">
      <style:text-properties style:font-name="Aptos" style:font-name-asian="Aptos" style:font-name-complex="Aptos"/>
    </style:style>
    <style:style style:name="T2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1" style:parent-style-name="DefaultParagraphFont" style:family="text">
      <style:text-properties style:font-name="Aptos" style:font-name-asian="Aptos" style:font-name-complex="Aptos"/>
    </style:style>
    <style:style style:name="T2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3" style:parent-style-name="DefaultParagraphFont" style:family="text">
      <style:text-properties style:font-name="Aptos" style:font-name-asian="Aptos" style:font-name-complex="Aptos"/>
    </style:style>
    <style:style style:name="P24" style:parent-style-name="Heading2" style:family="paragraph">
      <style:paragraph-properties fo:margin-top="0.2076in" fo:margin-bottom="0.2076in"/>
    </style:style>
    <style:style style:name="T25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9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0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1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2" style:parent-style-name="Heading2" style:family="paragraph">
      <style:paragraph-properties fo:margin-top="0.2076in" fo:margin-bottom="0.2076in"/>
    </style:style>
    <style:style style:name="T33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TableColumn35" style:family="table-column">
      <style:table-column-properties style:column-width="1.2222in"/>
    </style:style>
    <style:style style:name="TableColumn36" style:family="table-column">
      <style:table-column-properties style:column-width="2.8555in"/>
    </style:style>
    <style:style style:name="Table34" style:family="table">
      <style:table-properties style:width="4.0777in" fo:margin-left="0in" table:align="left"/>
    </style:style>
    <style:style style:name="TableRow37" style:family="table-row">
      <style:table-row-properties style:min-row-height="0.2083in"/>
    </style:style>
    <style:style style:name="TableCell3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ableCell4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ableRow44" style:family="table-row">
      <style:table-row-properties style:min-row-height="0.2083in"/>
    </style:style>
    <style:style style:name="TableCell4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margin-bottom="0in"/>
    </style:style>
    <style:style style:name="TableCell4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margin-bottom="0in"/>
    </style:style>
    <style:style style:name="TableRow49" style:family="table-row">
      <style:table-row-properties style:min-row-height="0.2083in"/>
    </style:style>
    <style:style style:name="TableCell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margin-bottom="0in"/>
    </style:style>
    <style:style style:name="TableCell5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margin-bottom="0in"/>
    </style:style>
    <style:style style:name="TableRow54" style:family="table-row">
      <style:table-row-properties style:min-row-height="0.2083in"/>
    </style:style>
    <style:style style:name="TableCell5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6" style:parent-style-name="Normal" style:family="paragraph">
      <style:paragraph-properties fo:margin-bottom="0in"/>
    </style:style>
    <style:style style:name="TableCell5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8" style:parent-style-name="Normal" style:family="paragraph">
      <style:paragraph-properties fo:margin-bottom="0in"/>
    </style:style>
    <style:style style:name="TableRow59" style:family="table-row">
      <style:table-row-properties style:min-row-height="0.2083in"/>
    </style:style>
    <style:style style:name="TableCell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margin-bottom="0in"/>
    </style:style>
    <style:style style:name="TableCell6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margin-bottom="0in"/>
    </style:style>
    <style:style style:name="TableRow64" style:family="table-row">
      <style:table-row-properties style:min-row-height="0.2083in"/>
    </style:style>
    <style:style style:name="TableCell6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margin-bottom="0in"/>
    </style:style>
    <style:style style:name="TableCell6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margin-bottom="0in"/>
    </style:style>
    <style:style style:name="TableRow69" style:family="table-row">
      <style:table-row-properties style:min-row-height="0.2083in"/>
    </style:style>
    <style:style style:name="TableCell7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paragraph-properties fo:margin-bottom="0in"/>
    </style:style>
    <style:style style:name="TableCell7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margin-bottom="0in"/>
    </style:style>
    <style:style style:name="P74" style:parent-style-name="Heading2" style:family="paragraph">
      <style:paragraph-properties fo:margin-top="0.2076in" fo:margin-bottom="0.2076in"/>
    </style:style>
    <style:style style:name="T75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76" style:parent-style-name="Heading2" style:family="paragraph">
      <style:paragraph-properties fo:margin-top="0.2076in" fo:margin-bottom="0.2076in"/>
    </style:style>
    <style:style style:name="T77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78" style:parent-style-name="Heading3" style:family="paragraph">
      <style:paragraph-properties fo:margin-top="0.1951in" fo:margin-bottom="0.1951in"/>
    </style:style>
    <style:style style:name="T7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80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81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82" style:parent-style-name="Heading3" style:family="paragraph">
      <style:paragraph-properties fo:margin-top="0.1951in" fo:margin-bottom="0.1951in"/>
    </style:style>
    <style:style style:name="T8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84" style:parent-style-name="Normal" style:family="paragraph">
      <style:paragraph-properties fo:margin-top="0.1666in" fo:margin-bottom="0.1666in"/>
    </style:style>
    <style:style style:name="T85" style:parent-style-name="DefaultParagraphFont" style:family="text">
      <style:text-properties style:font-name="Aptos" style:font-name-asian="Aptos" style:font-name-complex="Aptos"/>
    </style:style>
    <style:style style:name="P86" style:parent-style-name="Normal" style:family="paragraph">
      <style:paragraph-properties fo:margin-top="0.1666in" fo:margin-bottom="0.1666in"/>
    </style:style>
    <style:style style:name="T87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P8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89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0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1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2" style:parent-style-name="Heading3" style:family="paragraph">
      <style:paragraph-properties fo:margin-top="0.1951in" fo:margin-bottom="0.1951in"/>
    </style:style>
    <style:style style:name="T9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94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7" style:parent-style-name="Heading2" style:family="paragraph">
      <style:paragraph-properties fo:margin-top="0.2076in" fo:margin-bottom="0.2076in"/>
    </style:style>
    <style:style style:name="T9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99" style:parent-style-name="Heading3" style:family="paragraph">
      <style:paragraph-properties fo:margin-top="0.1951in" fo:margin-bottom="0.1951in"/>
    </style:style>
    <style:style style:name="T10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01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02" style:parent-style-name="Heading3" style:family="paragraph">
      <style:paragraph-properties fo:margin-top="0.1951in" fo:margin-bottom="0.1951in"/>
    </style:style>
    <style:style style:name="T10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04" style:parent-style-name="Normal" style:family="paragraph">
      <style:paragraph-properties fo:margin-top="0.1666in" fo:margin-bottom="0.1666in"/>
    </style:style>
    <style:style style:name="T105" style:parent-style-name="DefaultParagraphFont" style:family="text">
      <style:text-properties style:font-name="Aptos" style:font-name-asian="Aptos" style:font-name-complex="Aptos"/>
    </style:style>
    <style:style style:name="P106" style:parent-style-name="Heading3" style:family="paragraph">
      <style:paragraph-properties fo:margin-top="0.1951in" fo:margin-bottom="0.1951in"/>
    </style:style>
    <style:style style:name="T10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0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09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10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11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12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13" style:parent-style-name="Heading3" style:family="paragraph">
      <style:paragraph-properties fo:margin-top="0.1951in" fo:margin-bottom="0.1951in"/>
    </style:style>
    <style:style style:name="T11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1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1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1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18" style:parent-style-name="Heading2" style:family="paragraph">
      <style:paragraph-properties fo:margin-top="0.2076in" fo:margin-bottom="0.2076in"/>
    </style:style>
    <style:style style:name="T119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20" style:parent-style-name="Heading3" style:family="paragraph">
      <style:paragraph-properties fo:margin-top="0.1951in" fo:margin-bottom="0.1951in"/>
    </style:style>
    <style:style style:name="T12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22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2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24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25" style:parent-style-name="Heading3" style:family="paragraph">
      <style:paragraph-properties fo:margin-top="0.1951in" fo:margin-bottom="0.1951in"/>
    </style:style>
    <style:style style:name="T12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27" style:parent-style-name="Normal" style:family="paragraph">
      <style:paragraph-properties fo:margin-top="0.1666in" fo:margin-bottom="0.1666in"/>
    </style:style>
    <style:style style:name="T128" style:parent-style-name="DefaultParagraphFont" style:family="text">
      <style:text-properties style:font-name="Aptos" style:font-name-asian="Aptos" style:font-name-complex="Aptos"/>
    </style:style>
    <style:style style:name="P129" style:parent-style-name="Heading3" style:family="paragraph">
      <style:paragraph-properties fo:margin-top="0.1951in" fo:margin-bottom="0.1951in"/>
    </style:style>
    <style:style style:name="T13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31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2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4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6" style:parent-style-name="Heading3" style:family="paragraph">
      <style:paragraph-properties fo:margin-top="0.1951in" fo:margin-bottom="0.1951in"/>
    </style:style>
    <style:style style:name="T13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3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9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0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1" style:parent-style-name="Heading2" style:family="paragraph">
      <style:paragraph-properties fo:margin-top="0.2076in" fo:margin-bottom="0.2076in"/>
    </style:style>
    <style:style style:name="T142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43" style:parent-style-name="Heading3" style:family="paragraph">
      <style:paragraph-properties fo:margin-top="0.1951in" fo:margin-bottom="0.1951in"/>
    </style:style>
    <style:style style:name="T14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4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7" style:parent-style-name="Heading3" style:family="paragraph">
      <style:paragraph-properties fo:margin-top="0.1951in" fo:margin-bottom="0.1951in"/>
    </style:style>
    <style:style style:name="T14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49" style:parent-style-name="Normal" style:family="paragraph">
      <style:paragraph-properties fo:margin-top="0.1666in" fo:margin-bottom="0.1666in"/>
    </style:style>
    <style:style style:name="T150" style:parent-style-name="DefaultParagraphFont" style:family="text">
      <style:text-properties style:font-name="Aptos" style:font-name-asian="Aptos" style:font-name-complex="Aptos"/>
    </style:style>
    <style:style style:name="P151" style:parent-style-name="Heading3" style:family="paragraph">
      <style:paragraph-properties fo:margin-top="0.1951in" fo:margin-bottom="0.1951in"/>
    </style:style>
    <style:style style:name="T15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5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54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5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5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5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5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59" style:parent-style-name="Heading3" style:family="paragraph">
      <style:paragraph-properties fo:margin-top="0.1951in" fo:margin-bottom="0.1951in"/>
    </style:style>
    <style:style style:name="T16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61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62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6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64" style:parent-style-name="Heading2" style:family="paragraph">
      <style:paragraph-properties fo:margin-top="0.2076in" fo:margin-bottom="0.2076in"/>
    </style:style>
    <style:style style:name="T165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66" style:parent-style-name="Heading3" style:family="paragraph">
      <style:paragraph-properties fo:margin-top="0.1951in" fo:margin-bottom="0.1951in"/>
    </style:style>
    <style:style style:name="T16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6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69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70" style:parent-style-name="Heading3" style:family="paragraph">
      <style:paragraph-properties fo:margin-top="0.1951in" fo:margin-bottom="0.1951in"/>
    </style:style>
    <style:style style:name="T17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72" style:parent-style-name="Normal" style:family="paragraph">
      <style:paragraph-properties fo:margin-top="0.1666in" fo:margin-bottom="0.1666in"/>
    </style:style>
    <style:style style:name="T173" style:parent-style-name="DefaultParagraphFont" style:family="text">
      <style:text-properties style:font-name="Aptos" style:font-name-asian="Aptos" style:font-name-complex="Aptos"/>
    </style:style>
    <style:style style:name="P174" style:parent-style-name="Heading3" style:family="paragraph">
      <style:paragraph-properties fo:margin-top="0.1951in" fo:margin-bottom="0.1951in"/>
    </style:style>
    <style:style style:name="T17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7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7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7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79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80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81" style:parent-style-name="Heading3" style:family="paragraph">
      <style:paragraph-properties fo:margin-top="0.1951in" fo:margin-bottom="0.1951in"/>
    </style:style>
    <style:style style:name="T18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8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84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8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86" style:parent-style-name="Heading2" style:family="paragraph">
      <style:paragraph-properties fo:margin-top="0.2076in" fo:margin-bottom="0.2076in"/>
    </style:style>
    <style:style style:name="T187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88" style:parent-style-name="Heading3" style:family="paragraph">
      <style:paragraph-properties fo:margin-top="0.1951in" fo:margin-bottom="0.1951in"/>
    </style:style>
    <style:style style:name="T18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90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91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92" style:parent-style-name="Heading3" style:family="paragraph">
      <style:paragraph-properties fo:margin-top="0.1951in" fo:margin-bottom="0.1951in"/>
    </style:style>
    <style:style style:name="T19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94" style:parent-style-name="Normal" style:family="paragraph">
      <style:paragraph-properties fo:margin-top="0.1666in" fo:margin-bottom="0.1666in"/>
    </style:style>
    <style:style style:name="T195" style:parent-style-name="DefaultParagraphFont" style:family="text">
      <style:text-properties style:font-name="Aptos" style:font-name-asian="Aptos" style:font-name-complex="Aptos"/>
    </style:style>
    <style:style style:name="P196" style:parent-style-name="Heading3" style:family="paragraph">
      <style:paragraph-properties fo:margin-top="0.1951in" fo:margin-bottom="0.1951in"/>
    </style:style>
    <style:style style:name="T19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9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99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00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01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02" style:parent-style-name="Heading3" style:family="paragraph">
      <style:paragraph-properties fo:margin-top="0.1951in" fo:margin-bottom="0.1951in"/>
    </style:style>
    <style:style style:name="T20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04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0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0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07" style:parent-style-name="Heading2" style:family="paragraph">
      <style:paragraph-properties fo:margin-top="0.2076in" fo:margin-bottom="0.2076in"/>
    </style:style>
    <style:style style:name="T20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09" style:parent-style-name="Heading3" style:family="paragraph">
      <style:paragraph-properties fo:margin-top="0.1951in" fo:margin-bottom="0.1951in"/>
    </style:style>
    <style:style style:name="T21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11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12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13" style:parent-style-name="Heading3" style:family="paragraph">
      <style:paragraph-properties fo:margin-top="0.1951in" fo:margin-bottom="0.1951in"/>
    </style:style>
    <style:style style:name="T21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15" style:parent-style-name="Normal" style:family="paragraph">
      <style:paragraph-properties fo:margin-top="0.1666in" fo:margin-bottom="0.1666in"/>
    </style:style>
    <style:style style:name="T216" style:parent-style-name="DefaultParagraphFont" style:family="text">
      <style:text-properties style:font-name="Aptos" style:font-name-asian="Aptos" style:font-name-complex="Aptos"/>
    </style:style>
    <style:style style:name="P217" style:parent-style-name="Heading3" style:family="paragraph">
      <style:paragraph-properties fo:margin-top="0.1951in" fo:margin-bottom="0.1951in"/>
    </style:style>
    <style:style style:name="T21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19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20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21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22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2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24" style:parent-style-name="Heading3" style:family="paragraph">
      <style:paragraph-properties fo:margin-top="0.1951in" fo:margin-bottom="0.1951in"/>
    </style:style>
    <style:style style:name="T22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2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2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2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29" style:parent-style-name="Heading2" style:family="paragraph">
      <style:paragraph-properties fo:margin-top="0.2076in" fo:margin-bottom="0.2076in"/>
    </style:style>
    <style:style style:name="T230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31" style:parent-style-name="Heading3" style:family="paragraph">
      <style:paragraph-properties fo:margin-top="0.1951in" fo:margin-bottom="0.1951in"/>
    </style:style>
    <style:style style:name="T23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3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34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35" style:parent-style-name="Heading3" style:family="paragraph">
      <style:paragraph-properties fo:margin-top="0.1951in" fo:margin-bottom="0.1951in"/>
    </style:style>
    <style:style style:name="T23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37" style:parent-style-name="Normal" style:family="paragraph">
      <style:paragraph-properties fo:margin-top="0.1666in" fo:margin-bottom="0.1666in"/>
    </style:style>
    <style:style style:name="T238" style:parent-style-name="DefaultParagraphFont" style:family="text">
      <style:text-properties style:font-name="Aptos" style:font-name-asian="Aptos" style:font-name-complex="Aptos"/>
    </style:style>
    <style:style style:name="P239" style:parent-style-name="Heading3" style:family="paragraph">
      <style:paragraph-properties fo:margin-top="0.1951in" fo:margin-bottom="0.1951in"/>
    </style:style>
    <style:style style:name="T24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41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42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4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44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4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46" style:parent-style-name="Heading3" style:family="paragraph">
      <style:paragraph-properties fo:margin-top="0.1951in" fo:margin-bottom="0.1951in"/>
    </style:style>
    <style:style style:name="T24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4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49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50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51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52" style:parent-style-name="Heading2" style:family="paragraph">
      <style:paragraph-properties fo:margin-top="0.2076in" fo:margin-bottom="0.2076in"/>
    </style:style>
    <style:style style:name="T253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54" style:parent-style-name="Heading3" style:family="paragraph">
      <style:paragraph-properties fo:margin-top="0.1951in" fo:margin-bottom="0.1951in"/>
    </style:style>
    <style:style style:name="T25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5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5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5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59" style:parent-style-name="Heading3" style:family="paragraph">
      <style:paragraph-properties fo:margin-top="0.1951in" fo:margin-bottom="0.1951in"/>
    </style:style>
    <style:style style:name="T26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61" style:parent-style-name="Normal" style:family="paragraph">
      <style:paragraph-properties fo:margin-top="0.1666in" fo:margin-bottom="0.1666in"/>
    </style:style>
    <style:style style:name="T262" style:parent-style-name="DefaultParagraphFont" style:family="text">
      <style:text-properties style:font-name="Aptos" style:font-name-asian="Aptos" style:font-name-complex="Aptos"/>
    </style:style>
    <style:style style:name="P263" style:parent-style-name="Heading3" style:family="paragraph">
      <style:paragraph-properties fo:margin-top="0.1951in" fo:margin-bottom="0.1951in"/>
    </style:style>
    <style:style style:name="T26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6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6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6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6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69" style:parent-style-name="Heading3" style:family="paragraph">
      <style:paragraph-properties fo:margin-top="0.1951in" fo:margin-bottom="0.1951in"/>
    </style:style>
    <style:style style:name="T27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71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72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7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74" style:parent-style-name="Heading2" style:family="paragraph">
      <style:paragraph-properties fo:margin-top="0.2076in" fo:margin-bottom="0.2076in"/>
    </style:style>
    <style:style style:name="T275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76" style:parent-style-name="Heading3" style:family="paragraph">
      <style:paragraph-properties fo:margin-top="0.1951in" fo:margin-bottom="0.1951in"/>
    </style:style>
    <style:style style:name="T27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7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79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80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81" style:parent-style-name="Heading3" style:family="paragraph">
      <style:paragraph-properties fo:margin-top="0.1951in" fo:margin-bottom="0.1951in"/>
    </style:style>
    <style:style style:name="T28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83" style:parent-style-name="Normal" style:family="paragraph">
      <style:paragraph-properties fo:margin-top="0.1666in" fo:margin-bottom="0.1666in"/>
    </style:style>
    <style:style style:name="T284" style:parent-style-name="DefaultParagraphFont" style:family="text">
      <style:text-properties style:font-name="Aptos" style:font-name-asian="Aptos" style:font-name-complex="Aptos"/>
    </style:style>
    <style:style style:name="P285" style:parent-style-name="Heading3" style:family="paragraph">
      <style:paragraph-properties fo:margin-top="0.1951in" fo:margin-bottom="0.1951in"/>
    </style:style>
    <style:style style:name="T28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8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8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89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90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91" style:parent-style-name="Heading3" style:family="paragraph">
      <style:paragraph-properties fo:margin-top="0.1951in" fo:margin-bottom="0.1951in"/>
    </style:style>
    <style:style style:name="T29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9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94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9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96" style:parent-style-name="Heading2" style:family="paragraph">
      <style:paragraph-properties fo:margin-top="0.2076in" fo:margin-bottom="0.2076in"/>
    </style:style>
    <style:style style:name="T297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98" style:parent-style-name="Heading3" style:family="paragraph">
      <style:paragraph-properties fo:margin-top="0.1951in" fo:margin-bottom="0.1951in"/>
    </style:style>
    <style:style style:name="T29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00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01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02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03" style:parent-style-name="Heading3" style:family="paragraph">
      <style:paragraph-properties fo:margin-top="0.1951in" fo:margin-bottom="0.1951in"/>
    </style:style>
    <style:style style:name="T30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05" style:parent-style-name="Normal" style:family="paragraph">
      <style:paragraph-properties fo:margin-top="0.1666in" fo:margin-bottom="0.1666in"/>
    </style:style>
    <style:style style:name="T306" style:parent-style-name="DefaultParagraphFont" style:family="text">
      <style:text-properties style:font-name="Aptos" style:font-name-asian="Aptos" style:font-name-complex="Aptos"/>
    </style:style>
    <style:style style:name="P307" style:parent-style-name="Heading3" style:family="paragraph">
      <style:paragraph-properties fo:margin-top="0.1951in" fo:margin-bottom="0.1951in"/>
    </style:style>
    <style:style style:name="T30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09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10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11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12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13" style:parent-style-name="Heading3" style:family="paragraph">
      <style:paragraph-properties fo:margin-top="0.1951in" fo:margin-bottom="0.1951in"/>
    </style:style>
    <style:style style:name="T31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1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1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1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18" style:parent-style-name="Heading2" style:family="paragraph">
      <style:paragraph-properties fo:margin-top="0.2076in" fo:margin-bottom="0.2076in"/>
    </style:style>
    <style:style style:name="T319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320" style:parent-style-name="Heading3" style:family="paragraph">
      <style:paragraph-properties fo:margin-top="0.1951in" fo:margin-bottom="0.1951in"/>
    </style:style>
    <style:style style:name="T32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22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23" style:parent-style-name="Heading3" style:family="paragraph">
      <style:paragraph-properties fo:margin-top="0.1951in" fo:margin-bottom="0.1951in"/>
    </style:style>
    <style:style style:name="T32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25" style:parent-style-name="Normal" style:family="paragraph">
      <style:paragraph-properties fo:margin-top="0.1666in" fo:margin-bottom="0.1666in"/>
    </style:style>
    <style:style style:name="T326" style:parent-style-name="DefaultParagraphFont" style:family="text">
      <style:text-properties style:font-name="Aptos" style:font-name-asian="Aptos" style:font-name-complex="Aptos"/>
    </style:style>
    <style:style style:name="P327" style:parent-style-name="Heading3" style:family="paragraph">
      <style:paragraph-properties fo:margin-top="0.1951in" fo:margin-bottom="0.1951in"/>
    </style:style>
    <style:style style:name="T32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29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30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31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32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3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34" style:parent-style-name="Heading3" style:family="paragraph">
      <style:paragraph-properties fo:margin-top="0.1951in" fo:margin-bottom="0.1951in"/>
    </style:style>
    <style:style style:name="T33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3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3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3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39" style:parent-style-name="Heading2" style:family="paragraph">
      <style:paragraph-properties fo:margin-top="0.2076in" fo:margin-bottom="0.2076in"/>
    </style:style>
    <style:style style:name="T340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341" style:parent-style-name="Heading3" style:family="paragraph">
      <style:paragraph-properties fo:margin-top="0.1951in" fo:margin-bottom="0.1951in"/>
    </style:style>
    <style:style style:name="T34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4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44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45" style:parent-style-name="Heading3" style:family="paragraph">
      <style:paragraph-properties fo:margin-top="0.1951in" fo:margin-bottom="0.1951in"/>
    </style:style>
    <style:style style:name="T34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47" style:parent-style-name="Normal" style:family="paragraph">
      <style:paragraph-properties fo:margin-top="0.1666in" fo:margin-bottom="0.1666in"/>
    </style:style>
    <style:style style:name="T348" style:parent-style-name="DefaultParagraphFont" style:family="text">
      <style:text-properties style:font-name="Aptos" style:font-name-asian="Aptos" style:font-name-complex="Aptos"/>
    </style:style>
    <style:style style:name="P349" style:parent-style-name="Heading3" style:family="paragraph">
      <style:paragraph-properties fo:margin-top="0.1951in" fo:margin-bottom="0.1951in"/>
    </style:style>
    <style:style style:name="T35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51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52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5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54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5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56" style:parent-style-name="Heading3" style:family="paragraph">
      <style:paragraph-properties fo:margin-top="0.1951in" fo:margin-bottom="0.1951in"/>
    </style:style>
    <style:style style:name="T35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5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59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60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61" style:parent-style-name="Heading3" style:family="paragraph">
      <style:paragraph-properties fo:margin-top="0.1951in" fo:margin-bottom="0.1951in"/>
    </style:style>
    <style:style style:name="T36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6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64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6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66" style:parent-style-name="Heading2" style:family="paragraph">
      <style:paragraph-properties fo:margin-top="0.2076in" fo:margin-bottom="0.2076in"/>
    </style:style>
    <style:style style:name="T367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368" style:parent-style-name="Normal" style:family="paragraph">
      <style:paragraph-properties fo:margin-top="0.1666in" fo:margin-bottom="0.1666in"/>
    </style:style>
    <style:style style:name="T369" style:parent-style-name="DefaultParagraphFont" style:family="text">
      <style:text-properties style:font-name="Aptos" style:font-name-asian="Aptos" style:font-name-complex="Aptos"/>
    </style:style>
    <style:style style:name="T370" style:parent-style-name="DefaultParagraphFont" style:family="text">
      <style:text-properties style:font-name="Aptos" style:font-name-asian="Aptos" style:font-name-complex="Aptos"/>
    </style:style>
    <style:style style:name="T371" style:parent-style-name="DefaultParagraphFont" style:family="text">
      <style:text-properties style:font-name="Aptos" style:font-name-asian="Aptos" style:font-name-complex="Aptos"/>
    </style:style>
    <style:style style:name="T372" style:parent-style-name="DefaultParagraphFont" style:family="text">
      <style:text-properties style:font-name="Aptos" style:font-name-asian="Aptos" style:font-name-complex="Aptos"/>
    </style:style>
    <style:style style:name="T373" style:parent-style-name="DefaultParagraphFont" style:family="text">
      <style:text-properties style:font-name="Aptos" style:font-name-asian="Aptos" style:font-name-complex="Aptos"/>
    </style:style>
    <style:style style:name="T374" style:parent-style-name="DefaultParagraphFont" style:family="text">
      <style:text-properties style:font-name="Aptos" style:font-name-asian="Aptos" style:font-name-complex="Aptos"/>
    </style:style>
    <style:style style:name="P375" style:parent-style-name="Heading2" style:family="paragraph">
      <style:paragraph-properties fo:margin-top="0.2076in" fo:margin-bottom="0.2076in"/>
    </style:style>
    <style:style style:name="T376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37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7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79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80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81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82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8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84" style:parent-style-name="Heading2" style:family="paragraph">
      <style:paragraph-properties fo:margin-top="0.2076in" fo:margin-bottom="0.2076in"/>
    </style:style>
    <style:style style:name="T385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38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8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8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</office:automatic-styles>
  <office:body>
    <office:text text:use-soft-page-breaks="true">
      <text:h text:style-name="P1" text:outline-level="1"><text:span text:style-name="T2">STATEMENT OF WORK (SOW)</text:span></text:h>
      <text:h text:style-name="P3" text:outline-level="2"><text:span text:style-name="T4">Multi-Tenant Recruitment SaaS Platform with Zoho CRM (Super Admin)</text:span></text:h>
      <text:p text:style-name="Normal"/>
      <text:h text:style-name="P5" text:outline-level="2"><text:span text:style-name="T6">1. Introduction</text:span></text:h>
      <text:p text:style-name="P7"><text:span text:style-name="T8">This Statement of Work (“SOW”) defines the scope, features, responsibilities, deliverables, and execution approach for the design and development of a<text:s/></text:span><text:span text:style-name="T9">cloud-based Recruitment &amp; Hiring SaaS Platform.</text:span></text:p>
      <text:p text:style-name="P10"><text:span text:style-name="T11">The platform will serve two purposes:</text:span></text:p>
      <text:list text:style-name="LFO44" text:continue-numbering="true">
        <text:list-item>
          <text:p text:style-name="P12"><text:span text:style-name="T13">Internal Usage</text:span><text:span text:style-name="T14"><text:s/>– To manage the client’s own recruitment operations</text:span></text:p>
        </text:list-item>
        <text:list-item>
          <text:p text:style-name="P15"><text:span text:style-name="T16">Commercial SaaS Offering</text:span><text:span text:style-name="T17"><text:s/>– To provide recruitment software as a subscription service to external companies</text:span></text:p>
        </text:list-item>
      </text:list>
      <text:p text:style-name="P18"><text:span text:style-name="T19">The system will be inspired by industry platforms such as<text:s/></text:span><text:span text:style-name="T20">Zoho Recruit</text:span><text:span text:style-name="T21">, with the addition of<text:s/></text:span><text:span text:style-name="T22">Zoho CRM integration at the Super Admin level</text:span><text:span text:style-name="T23"><text:s/>for managing sales, customers, and subscriptions.</text:span></text:p>
      <text:p text:style-name="Normal"/>
      <text:h text:style-name="P24" text:outline-level="2"><text:span text:style-name="T25">2. Project Objectives</text:span></text:h>
      <text:list text:style-name="LFO43" text:continue-numbering="true">
        <text:list-item>
          <text:p text:style-name="P26">Build a scalable, secure, multi-tenant recruitment SaaS platform</text:p>
        </text:list-item>
        <text:list-item>
          <text:p text:style-name="P27">Enable complete end-to-end recruitment workflow automation</text:p>
        </text:list-item>
        <text:list-item>
          <text:p text:style-name="P28">Allow the client to onboard and manage multiple companies</text:p>
        </text:list-item>
        <text:list-item>
          <text:p text:style-name="P29">Provide subscription-based access with plan limits</text:p>
        </text:list-item>
        <text:list-item>
          <text:p text:style-name="P30">Integrate Zoho CRM for SaaS sales and customer management</text:p>
        </text:list-item>
        <text:list-item>
          <text:p text:style-name="P31">Maintain strict separation between hiring data and sales data</text:p>
        </text:list-item>
      </text:list>
      <text:p text:style-name="Normal"/>
      <text:h text:style-name="P32" text:outline-level="2"><text:span text:style-name="T33">3. Users &amp; Roles Overview</text:span></text:h>
      <table:table table:style-name="Table34">
        <table:table-columns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<text:span text:style-name="T40">Role</text:span></text:p>
          </table:table-cell>
          <table:table-cell table:style-name="TableCell41">
            <text:p text:style-name="P42"><text:span text:style-name="T43">Description</text:span></text:p>
          </table:table-cell>
        </table:table-row>
        <table:table-row table:style-name="TableRow44">
          <table:table-cell table:style-name="TableCell45">
            <text:p text:style-name="P46">Super Admin</text:p>
          </table:table-cell>
          <table:table-cell table:style-name="TableCell47">
            <text:p text:style-name="P48">Platform owner (Client)</text:p>
          </table:table-cell>
        </table:table-row>
        <table:table-row table:style-name="TableRow49">
          <table:table-cell table:style-name="TableCell50">
            <text:p text:style-name="P51">Agency Admin</text:p>
          </table:table-cell>
          <table:table-cell table:style-name="TableCell52">
            <text:p text:style-name="P53">Admin for internal hiring agency</text:p>
          </table:table-cell>
        </table:table-row>
        <table:table-row table:style-name="TableRow54">
          <table:table-cell table:style-name="TableCell55">
            <text:p text:style-name="P56">Recruiter</text:p>
          </table:table-cell>
          <table:table-cell table:style-name="TableCell57">
            <text:p text:style-name="P58">Executes hiring activities</text:p>
          </table:table-cell>
        </table:table-row>
        <table:table-row table:style-name="TableRow59">
          <table:table-cell table:style-name="TableCell60">
            <text:p text:style-name="P61">Client HR</text:p>
          </table:table-cell>
          <table:table-cell table:style-name="TableCell62">
            <text:p text:style-name="P63">Hiring manager from external company</text:p>
          </table:table-cell>
        </table:table-row>
        <table:table-row table:style-name="TableRow64">
          <table:table-cell table:style-name="TableCell65">
            <text:p text:style-name="P66">Interviewer</text:p>
          </table:table-cell>
          <table:table-cell table:style-name="TableCell67">
            <text:p text:style-name="P68">Conducts interviews</text:p>
          </table:table-cell>
        </table:table-row>
        <table:table-row table:style-name="TableRow69">
          <table:table-cell table:style-name="TableCell70">
            <text:p text:style-name="P71">Candidate</text:p>
          </table:table-cell>
          <table:table-cell table:style-name="TableCell72">
            <text:p text:style-name="P73">Applies for jobs</text:p>
          </table:table-cell>
        </table:table-row>
      </table:table>
      <text:p text:style-name="Normal"/>
      <text:h text:style-name="P74" text:outline-level="2"><text:span text:style-name="T75">4. Detailed Scope of Work (Modules)</text:span></text:h>
      <text:p text:style-name="Normal"/>
      <text:h text:style-name="P76" text:outline-level="2"><text:span text:style-name="T77">4.1 Multi-Tenant SaaS Core (Platform Foundation)</text:span></text:h>
      <text:h text:style-name="P78" text:outline-level="3"><text:span text:style-name="T79">Users</text:span></text:h>
      <text:list text:style-name="LFO42" text:continue-numbering="true">
        <text:list-item>
          <text:p text:style-name="P80">Super Admin</text:p>
        </text:list-item>
        <text:list-item>
          <text:p text:style-name="P81">All company users (indirect)</text:p>
        </text:list-item>
      </text:list>
      <text:h text:style-name="P82" text:outline-level="3"><text:span text:style-name="T83">Purpose</text:span></text:h>
      <text:p text:style-name="P84"><text:span text:style-name="T85">To allow multiple companies to use the same platform while keeping their data isolated and secure.</text:span></text:p>
      <text:p text:style-name="P86"><text:span text:style-name="T87">Features</text:span></text:p>
      <text:list text:style-name="LFO41" text:continue-numbering="true">
        <text:list-item>
          <text:p text:style-name="P88">Tenant (company) creation</text:p>
        </text:list-item>
        <text:list-item>
          <text:p text:style-name="P89">Data isolation per company</text:p>
        </text:list-item>
        <text:list-item>
          <text:p text:style-name="P90">Tenant-aware API requests</text:p>
        </text:list-item>
        <text:list-item>
          <text:p text:style-name="P91">Shared infrastructure, isolated data model</text:p>
        </text:list-item>
      </text:list>
      <text:h text:style-name="P92" text:outline-level="3"><text:span text:style-name="T93">Business Value</text:span></text:h>
      <text:list text:style-name="LFO40" text:continue-numbering="true">
        <text:list-item>
          <text:p text:style-name="P94">Enables SaaS scalability</text:p>
        </text:list-item>
        <text:list-item>
          <text:p text:style-name="P95">Supports both internal and external clients</text:p>
        </text:list-item>
        <text:list-item>
          <text:p text:style-name="P96">Reduces operational cost</text:p>
        </text:list-item>
      </text:list>
      <text:p text:style-name="Normal"/>
      <text:h text:style-name="P97" text:outline-level="2"><text:span text:style-name="T98">4.2 Authentication &amp; Role-Based Access Control</text:span></text:h>
      <text:h text:style-name="P99" text:outline-level="3"><text:span text:style-name="T100">Users</text:span></text:h>
      <text:list text:style-name="LFO39" text:continue-numbering="true">
        <text:list-item>
          <text:p text:style-name="P101">All users</text:p>
        </text:list-item>
      </text:list>
      <text:h text:style-name="P102" text:outline-level="3"><text:span text:style-name="T103">Purpose</text:span></text:h>
      <text:p text:style-name="P104"><text:span text:style-name="T105">To control access based on user role and company.</text:span></text:p>
      <text:h text:style-name="P106" text:outline-level="3"><text:span text:style-name="T107">Features</text:span></text:h>
      <text:list text:style-name="LFO38" text:continue-numbering="true">
        <text:list-item>
          <text:p text:style-name="P108">Secure login and logout</text:p>
        </text:list-item>
        <text:list-item>
          <text:p text:style-name="P109">Role-based permissions</text:p>
        </text:list-item>
        <text:list-item>
          <text:p text:style-name="P110">Password reset</text:p>
        </text:list-item>
        <text:list-item>
          <text:p text:style-name="P111">Session management</text:p>
        </text:list-item>
        <text:list-item>
          <text:p text:style-name="P112">Access validation for every action</text:p>
        </text:list-item>
      </text:list>
      <text:h text:style-name="P113" text:outline-level="3"><text:span text:style-name="T114">Business Value</text:span></text:h>
      <text:list text:style-name="LFO37" text:continue-numbering="true">
        <text:list-item>
          <text:p text:style-name="P115">Prevents unauthorized access</text:p>
        </text:list-item>
        <text:list-item>
          <text:p text:style-name="P116">Ensures data security</text:p>
        </text:list-item>
        <text:list-item>
          <text:p text:style-name="P117">Enables fine-grained control</text:p>
        </text:list-item>
      </text:list>
      <text:p text:style-name="Normal"/>
      <text:h text:style-name="P118" text:outline-level="2"><text:span text:style-name="T119">4.3 Company &amp; Account Management Module</text:span></text:h>
      <text:h text:style-name="P120" text:outline-level="3"><text:span text:style-name="T121">Users</text:span></text:h>
      <text:list text:style-name="LFO36" text:continue-numbering="true">
        <text:list-item>
          <text:p text:style-name="P122">Super Admin</text:p>
        </text:list-item>
        <text:list-item>
          <text:p text:style-name="P123">Agency Admin</text:p>
        </text:list-item>
        <text:list-item>
          <text:p text:style-name="P124">Client HR Admin</text:p>
        </text:list-item>
      </text:list>
      <text:h text:style-name="P125" text:outline-level="3"><text:span text:style-name="T126">Purpose</text:span></text:h>
      <text:p text:style-name="P127"><text:span text:style-name="T128">To manage companies using the platform.</text:span></text:p>
      <text:h text:style-name="P129" text:outline-level="3"><text:span text:style-name="T130">Features</text:span></text:h>
      <text:list text:style-name="LFO35" text:continue-numbering="true">
        <text:list-item>
          <text:p text:style-name="P131">Company onboarding</text:p>
        </text:list-item>
        <text:list-item>
          <text:p text:style-name="P132">Company profile &amp; settings</text:p>
        </text:list-item>
        <text:list-item>
          <text:p text:style-name="P133">Branding (logo, email templates)</text:p>
        </text:list-item>
        <text:list-item>
          <text:p text:style-name="P134">User invitations and management</text:p>
        </text:list-item>
        <text:list-item>
          <text:p text:style-name="P135">Hiring pipeline configuration</text:p>
        </text:list-item>
      </text:list>
      <text:h text:style-name="P136" text:outline-level="3"><text:span text:style-name="T137">Business Value</text:span></text:h>
      <text:list text:style-name="LFO34" text:continue-numbering="true">
        <text:list-item>
          <text:p text:style-name="P138">Self-service onboarding</text:p>
        </text:list-item>
        <text:list-item>
          <text:p text:style-name="P139">Customizable per company</text:p>
        </text:list-item>
        <text:list-item>
          <text:p text:style-name="P140">Professional branding for clients</text:p>
        </text:list-item>
      </text:list>
      <text:p text:style-name="Normal"/>
      <text:h text:style-name="P141" text:outline-level="2"><text:span text:style-name="T142">4.4 Subscription &amp; Billing Module (SaaS Monetization)</text:span></text:h>
      <text:h text:style-name="P143" text:outline-level="3"><text:span text:style-name="T144">Users</text:span></text:h>
      <text:list text:style-name="LFO33" text:continue-numbering="true">
        <text:list-item>
          <text:p text:style-name="P145">Super Admin</text:p>
        </text:list-item>
        <text:list-item>
          <text:p text:style-name="P146">Company Admin</text:p>
        </text:list-item>
      </text:list>
      <text:h text:style-name="P147" text:outline-level="3"><text:span text:style-name="T148">Purpose</text:span></text:h>
      <text:p text:style-name="P149"><text:span text:style-name="T150">To manage SaaS plans, billing, and payments.</text:span></text:p>
      <text:h text:style-name="P151" text:outline-level="3"><text:span text:style-name="T152">Features</text:span></text:h>
      <text:list text:style-name="LFO32" text:continue-numbering="true">
        <text:list-item>
          <text:p text:style-name="P153">Subscription plans (Starter, Growth, Enterprise)</text:p>
        </text:list-item>
        <text:list-item>
          <text:p text:style-name="P154">Plan limits (users, jobs, candidates)</text:p>
        </text:list-item>
        <text:list-item>
          <text:p text:style-name="P155">Payment gateway integration</text:p>
        </text:list-item>
        <text:list-item>
          <text:p text:style-name="P156">Invoices and billing history</text:p>
        </text:list-item>
        <text:list-item>
          <text:p text:style-name="P157">Plan upgrade/downgrade</text:p>
        </text:list-item>
        <text:list-item>
          <text:p text:style-name="P158">Trial management</text:p>
        </text:list-item>
      </text:list>
      <text:h text:style-name="P159" text:outline-level="3"><text:span text:style-name="T160">Business Value</text:span></text:h>
      <text:list text:style-name="LFO31" text:continue-numbering="true">
        <text:list-item>
          <text:p text:style-name="P161">Revenue generation</text:p>
        </text:list-item>
        <text:list-item>
          <text:p text:style-name="P162">Automated billing</text:p>
        </text:list-item>
        <text:list-item>
          <text:p text:style-name="P163">Usage-based scaling</text:p>
        </text:list-item>
      </text:list>
      <text:p text:style-name="Normal"/>
      <text:h text:style-name="P164" text:outline-level="2"><text:span text:style-name="T165">4.5 Job Management Module</text:span></text:h>
      <text:h text:style-name="P166" text:outline-level="3"><text:span text:style-name="T167">Users</text:span></text:h>
      <text:list text:style-name="LFO30" text:continue-numbering="true">
        <text:list-item>
          <text:p text:style-name="P168">Recruiters</text:p>
        </text:list-item>
        <text:list-item>
          <text:p text:style-name="P169">Client HR</text:p>
        </text:list-item>
      </text:list>
      <text:h text:style-name="P170" text:outline-level="3"><text:span text:style-name="T171">Purpose</text:span></text:h>
      <text:p text:style-name="P172"><text:span text:style-name="T173">To create and manage job openings.</text:span></text:p>
      <text:h text:style-name="P174" text:outline-level="3"><text:span text:style-name="T175">Features</text:span></text:h>
      <text:list text:style-name="LFO29" text:continue-numbering="true">
        <text:list-item>
          <text:p text:style-name="P176">Job creation and editing</text:p>
        </text:list-item>
        <text:list-item>
          <text:p text:style-name="P177">Job descriptions and requirements</text:p>
        </text:list-item>
        <text:list-item>
          <text:p text:style-name="P178">Assign recruiters</text:p>
        </text:list-item>
        <text:list-item>
          <text:p text:style-name="P179">Job visibility controls</text:p>
        </text:list-item>
        <text:list-item>
          <text:p text:style-name="P180">Job status tracking</text:p>
        </text:list-item>
      </text:list>
      <text:h text:style-name="P181" text:outline-level="3"><text:span text:style-name="T182">Business Value</text:span></text:h>
      <text:list text:style-name="LFO28" text:continue-numbering="true">
        <text:list-item>
          <text:p text:style-name="P183">Centralized job handling</text:p>
        </text:list-item>
        <text:list-item>
          <text:p text:style-name="P184">Faster hiring cycle</text:p>
        </text:list-item>
        <text:list-item>
          <text:p text:style-name="P185">Clear ownership of roles</text:p>
        </text:list-item>
      </text:list>
      <text:p text:style-name="Normal"/>
      <text:h text:style-name="P186" text:outline-level="2"><text:span text:style-name="T187">4.6 Hiring Pipeline &amp; Workflow Engine</text:span></text:h>
      <text:h text:style-name="P188" text:outline-level="3"><text:span text:style-name="T189">Users</text:span></text:h>
      <text:list text:style-name="LFO27" text:continue-numbering="true">
        <text:list-item>
          <text:p text:style-name="P190">Recruiters</text:p>
        </text:list-item>
        <text:list-item>
          <text:p text:style-name="P191">Client HR</text:p>
        </text:list-item>
      </text:list>
      <text:h text:style-name="P192" text:outline-level="3"><text:span text:style-name="T193">Purpose</text:span></text:h>
      <text:p text:style-name="P194"><text:span text:style-name="T195">To manage candidate movement through hiring stages.</text:span></text:p>
      <text:h text:style-name="P196" text:outline-level="3"><text:span text:style-name="T197">Features</text:span></text:h>
      <text:list text:style-name="LFO26" text:continue-numbering="true">
        <text:list-item>
          <text:p text:style-name="P198">Custom pipeline stages per job</text:p>
        </text:list-item>
        <text:list-item>
          <text:p text:style-name="P199">Drag-and-drop candidate movement</text:p>
        </text:list-item>
        <text:list-item>
          <text:p text:style-name="P200">Automated triggers on stage change</text:p>
        </text:list-item>
        <text:list-item>
          <text:p text:style-name="P201">Rejection and offer handling</text:p>
        </text:list-item>
      </text:list>
      <text:h text:style-name="P202" text:outline-level="3"><text:span text:style-name="T203">Business Value</text:span></text:h>
      <text:list text:style-name="LFO25" text:continue-numbering="true">
        <text:list-item>
          <text:p text:style-name="P204">Standardized hiring process</text:p>
        </text:list-item>
        <text:list-item>
          <text:p text:style-name="P205">Reduced manual follow-ups</text:p>
        </text:list-item>
        <text:list-item>
          <text:p text:style-name="P206">Better hiring transparency</text:p>
        </text:list-item>
      </text:list>
      <text:p text:style-name="Normal"/>
      <text:h text:style-name="P207" text:outline-level="2"><text:span text:style-name="T208">4.7 Candidate ATS (Applicant Tracking System)</text:span></text:h>
      <text:h text:style-name="P209" text:outline-level="3"><text:span text:style-name="T210">Users</text:span></text:h>
      <text:list text:style-name="LFO24" text:continue-numbering="true">
        <text:list-item>
          <text:p text:style-name="P211">Recruiters</text:p>
        </text:list-item>
        <text:list-item>
          <text:p text:style-name="P212">Client HR</text:p>
        </text:list-item>
      </text:list>
      <text:h text:style-name="P213" text:outline-level="3"><text:span text:style-name="T214">Purpose</text:span></text:h>
      <text:p text:style-name="P215"><text:span text:style-name="T216">To manage candidate data across jobs.</text:span></text:p>
      <text:h text:style-name="P217" text:outline-level="3"><text:span text:style-name="T218">Features</text:span></text:h>
      <text:list text:style-name="LFO23" text:continue-numbering="true">
        <text:list-item>
          <text:p text:style-name="P219">Candidate profiles</text:p>
        </text:list-item>
        <text:list-item>
          <text:p text:style-name="P220">Resume upload and storage</text:p>
        </text:list-item>
        <text:list-item>
          <text:p text:style-name="P221">Skill tags and notes</text:p>
        </text:list-item>
        <text:list-item>
          <text:p text:style-name="P222">Duplicate detection</text:p>
        </text:list-item>
        <text:list-item>
          <text:p text:style-name="P223">Application history</text:p>
        </text:list-item>
      </text:list>
      <text:h text:style-name="P224" text:outline-level="3"><text:span text:style-name="T225">Business Value</text:span></text:h>
      <text:list text:style-name="LFO22" text:continue-numbering="true">
        <text:list-item>
          <text:p text:style-name="P226">Reusable candidate database</text:p>
        </text:list-item>
        <text:list-item>
          <text:p text:style-name="P227">Reduced hiring effort</text:p>
        </text:list-item>
        <text:list-item>
          <text:p text:style-name="P228">Better talent tracking</text:p>
        </text:list-item>
      </text:list>
      <text:p text:style-name="Normal"/>
      <text:h text:style-name="P229" text:outline-level="2"><text:span text:style-name="T230">4.8 Career Page &amp; Public Job Board</text:span></text:h>
      <text:h text:style-name="P231" text:outline-level="3"><text:span text:style-name="T232">Users</text:span></text:h>
      <text:list text:style-name="LFO21" text:continue-numbering="true">
        <text:list-item>
          <text:p text:style-name="P233">Candidates</text:p>
        </text:list-item>
        <text:list-item>
          <text:p text:style-name="P234">Client HR</text:p>
        </text:list-item>
      </text:list>
      <text:h text:style-name="P235" text:outline-level="3"><text:span text:style-name="T236">Purpose</text:span></text:h>
      <text:p text:style-name="P237"><text:span text:style-name="T238">To allow candidates to apply for jobs publicly.</text:span></text:p>
      <text:h text:style-name="P239" text:outline-level="3"><text:span text:style-name="T240">Features</text:span></text:h>
      <text:list text:style-name="LFO20" text:continue-numbering="true">
        <text:list-item>
          <text:p text:style-name="P241">Company-specific career pages</text:p>
        </text:list-item>
        <text:list-item>
          <text:p text:style-name="P242">Public job listings</text:p>
        </text:list-item>
        <text:list-item>
          <text:p text:style-name="P243">Application forms</text:p>
        </text:list-item>
        <text:list-item>
          <text:p text:style-name="P244">Resume upload</text:p>
        </text:list-item>
        <text:list-item>
          <text:p text:style-name="P245">Candidate consent capture</text:p>
        </text:list-item>
      </text:list>
      <text:h text:style-name="P246" text:outline-level="3"><text:span text:style-name="T247">Business Value</text:span></text:h>
      <text:list text:style-name="LFO19" text:continue-numbering="true">
        <text:list-item>
          <text:p text:style-name="P248">Improves employer branding</text:p>
        </text:list-item>
        <text:list-item>
          <text:p text:style-name="P249">Increases applicant reach</text:p>
        </text:list-item>
        <text:list-item>
          <text:p text:style-name="P250">Automated candidate intake</text:p>
        </text:list-item>
      </text:list>
      <text:p text:style-name="P251"/>
      <text:p text:style-name="Normal"/>
      <text:h text:style-name="P252" text:outline-level="2"><text:span text:style-name="T253">4.9 Interview Scheduling &amp; Feedback Module</text:span></text:h>
      <text:h text:style-name="P254" text:outline-level="3"><text:span text:style-name="T255">Users</text:span></text:h>
      <text:list text:style-name="LFO18" text:continue-numbering="true">
        <text:list-item>
          <text:p text:style-name="P256">Recruiters</text:p>
        </text:list-item>
        <text:list-item>
          <text:p text:style-name="P257">Interviewers</text:p>
        </text:list-item>
        <text:list-item>
          <text:p text:style-name="P258">Client HR</text:p>
        </text:list-item>
      </text:list>
      <text:h text:style-name="P259" text:outline-level="3"><text:span text:style-name="T260">Purpose</text:span></text:h>
      <text:p text:style-name="P261"><text:span text:style-name="T262">To manage interviews and evaluations.</text:span></text:p>
      <text:h text:style-name="P263" text:outline-level="3"><text:span text:style-name="T264">Features</text:span></text:h>
      <text:list text:style-name="LFO17" text:continue-numbering="true">
        <text:list-item>
          <text:p text:style-name="P265">Interview scheduling</text:p>
        </text:list-item>
        <text:list-item>
          <text:p text:style-name="P266">Interviewer assignment</text:p>
        </text:list-item>
        <text:list-item>
          <text:p text:style-name="P267">Feedback forms</text:p>
        </text:list-item>
        <text:list-item>
          <text:p text:style-name="P268">Interview status tracking</text:p>
        </text:list-item>
      </text:list>
      <text:h text:style-name="P269" text:outline-level="3"><text:span text:style-name="T270">Business Value</text:span></text:h>
      <text:list text:style-name="LFO16" text:continue-numbering="true">
        <text:list-item>
          <text:p text:style-name="P271">Structured evaluation</text:p>
        </text:list-item>
        <text:list-item>
          <text:p text:style-name="P272">Reduced coordination effort</text:p>
        </text:list-item>
        <text:list-item>
          <text:p text:style-name="P273">Better hiring decisions</text:p>
        </text:list-item>
      </text:list>
      <text:p text:style-name="Normal"/>
      <text:h text:style-name="P274" text:outline-level="2"><text:span text:style-name="T275">4.10 Communication &amp; Notification Module</text:span></text:h>
      <text:h text:style-name="P276" text:outline-level="3"><text:span text:style-name="T277">Users</text:span></text:h>
      <text:list text:style-name="LFO15" text:continue-numbering="true">
        <text:list-item>
          <text:p text:style-name="P278">Recruiters</text:p>
        </text:list-item>
        <text:list-item>
          <text:p text:style-name="P279">Candidates</text:p>
        </text:list-item>
        <text:list-item>
          <text:p text:style-name="P280">Interviewers</text:p>
        </text:list-item>
      </text:list>
      <text:h text:style-name="P281" text:outline-level="3"><text:span text:style-name="T282">Purpose</text:span></text:h>
      <text:p text:style-name="P283"><text:span text:style-name="T284">To automate communication.</text:span></text:p>
      <text:h text:style-name="P285" text:outline-level="3"><text:span text:style-name="T286">Features</text:span></text:h>
      <text:list text:style-name="LFO14" text:continue-numbering="true">
        <text:list-item>
          <text:p text:style-name="P287">Email notifications</text:p>
        </text:list-item>
        <text:list-item>
          <text:p text:style-name="P288">Status update emails</text:p>
        </text:list-item>
        <text:list-item>
          <text:p text:style-name="P289">Interview invites</text:p>
        </text:list-item>
        <text:list-item>
          <text:p text:style-name="P290">Template customization per company</text:p>
        </text:list-item>
      </text:list>
      <text:h text:style-name="P291" text:outline-level="3"><text:span text:style-name="T292">Business Value</text:span></text:h>
      <text:list text:style-name="LFO13" text:continue-numbering="true">
        <text:list-item>
          <text:p text:style-name="P293">Faster communication</text:p>
        </text:list-item>
        <text:list-item>
          <text:p text:style-name="P294">Professional candidate experience</text:p>
        </text:list-item>
        <text:list-item>
          <text:p text:style-name="P295">Reduced recruiter workload</text:p>
        </text:list-item>
      </text:list>
      <text:p text:style-name="Normal"/>
      <text:h text:style-name="P296" text:outline-level="2"><text:span text:style-name="T297">4.11 Reporting &amp; Analytics Module</text:span></text:h>
      <text:h text:style-name="P298" text:outline-level="3"><text:span text:style-name="T299">Users</text:span></text:h>
      <text:list text:style-name="LFO12" text:continue-numbering="true">
        <text:list-item>
          <text:p text:style-name="P300">Super Admin</text:p>
        </text:list-item>
        <text:list-item>
          <text:p text:style-name="P301">Agency Admin</text:p>
        </text:list-item>
        <text:list-item>
          <text:p text:style-name="P302">Client HR</text:p>
        </text:list-item>
      </text:list>
      <text:h text:style-name="P303" text:outline-level="3"><text:span text:style-name="T304">Purpose</text:span></text:h>
      <text:p text:style-name="P305"><text:span text:style-name="T306">To provide hiring insights.</text:span></text:p>
      <text:h text:style-name="P307" text:outline-level="3"><text:span text:style-name="T308">Features</text:span></text:h>
      <text:list text:style-name="LFO11" text:continue-numbering="true">
        <text:list-item>
          <text:p text:style-name="P309">Hiring funnel reports</text:p>
        </text:list-item>
        <text:list-item>
          <text:p text:style-name="P310">Time-to-hire analytics</text:p>
        </text:list-item>
        <text:list-item>
          <text:p text:style-name="P311">Recruiter performance</text:p>
        </text:list-item>
        <text:list-item>
          <text:p text:style-name="P312">Exportable reports</text:p>
        </text:list-item>
      </text:list>
      <text:h text:style-name="P313" text:outline-level="3"><text:span text:style-name="T314">Business Value</text:span></text:h>
      <text:list text:style-name="LFO10" text:continue-numbering="true">
        <text:list-item>
          <text:p text:style-name="P315">Data-driven hiring decisions</text:p>
        </text:list-item>
        <text:list-item>
          <text:p text:style-name="P316">Performance optimization</text:p>
        </text:list-item>
        <text:list-item>
          <text:p text:style-name="P317">Management visibility</text:p>
        </text:list-item>
      </text:list>
      <text:p text:style-name="Normal"/>
      <text:h text:style-name="P318" text:outline-level="2"><text:span text:style-name="T319">4.12 Super Admin Panel</text:span></text:h>
      <text:h text:style-name="P320" text:outline-level="3"><text:span text:style-name="T321">Users</text:span></text:h>
      <text:list text:style-name="LFO9" text:continue-numbering="true">
        <text:list-item>
          <text:p text:style-name="P322">Super Admin only</text:p>
        </text:list-item>
      </text:list>
      <text:h text:style-name="P323" text:outline-level="3"><text:span text:style-name="T324">Purpose</text:span></text:h>
      <text:p text:style-name="P325"><text:span text:style-name="T326">To control the entire SaaS platform.</text:span></text:p>
      <text:h text:style-name="P327" text:outline-level="3"><text:span text:style-name="T328">Features</text:span></text:h>
      <text:list text:style-name="LFO8" text:continue-numbering="true">
        <text:list-item>
          <text:p text:style-name="P329">Manage all companies</text:p>
        </text:list-item>
        <text:list-item>
          <text:p text:style-name="P330">Manage subscription plans</text:p>
        </text:list-item>
        <text:list-item>
          <text:p text:style-name="P331">Platform analytics</text:p>
        </text:list-item>
        <text:list-item>
          <text:p text:style-name="P332">Usage monitoring</text:p>
        </text:list-item>
        <text:list-item>
          <text:p text:style-name="P333">Manual overrides</text:p>
        </text:list-item>
      </text:list>
      <text:h text:style-name="P334" text:outline-level="3"><text:span text:style-name="T335">Business Value</text:span></text:h>
      <text:list text:style-name="LFO7" text:continue-numbering="true">
        <text:list-item>
          <text:p text:style-name="P336">Full platform control</text:p>
        </text:list-item>
        <text:list-item>
          <text:p text:style-name="P337">Business visibility</text:p>
        </text:list-item>
        <text:list-item>
          <text:p text:style-name="P338">Operational oversight</text:p>
        </text:list-item>
      </text:list>
      <text:p text:style-name="Normal"/>
      <text:h text:style-name="P339" text:outline-level="2"><text:span text:style-name="T340">4.13 Zoho CRM Integration (Super Admin Only)</text:span></text:h>
      <text:h text:style-name="P341" text:outline-level="3"><text:span text:style-name="T342">Users</text:span></text:h>
      <text:list text:style-name="LFO6" text:continue-numbering="true">
        <text:list-item>
          <text:p text:style-name="P343">Super Admin</text:p>
        </text:list-item>
        <text:list-item>
          <text:p text:style-name="P344">Sales Team (via Zoho CRM)</text:p>
        </text:list-item>
      </text:list>
      <text:h text:style-name="P345" text:outline-level="3"><text:span text:style-name="T346">Purpose</text:span></text:h>
      <text:p text:style-name="P347"><text:span text:style-name="T348">To manage SaaS sales, customers, and revenue.</text:span></text:p>
      <text:h text:style-name="P349" text:outline-level="3"><text:span text:style-name="T350">Features</text:span></text:h>
      <text:list text:style-name="LFO5" text:continue-numbering="true">
        <text:list-item>
          <text:p text:style-name="P351">Lead creation from trial signups</text:p>
        </text:list-item>
        <text:list-item>
          <text:p text:style-name="P352">Account and contact sync</text:p>
        </text:list-item>
        <text:list-item>
          <text:p text:style-name="P353">Subscription deal tracking</text:p>
        </text:list-item>
        <text:list-item>
          <text:p text:style-name="P354">Renewal reminders</text:p>
        </text:list-item>
        <text:list-item>
          <text:p text:style-name="P355">CRM link inside Super Admin dashboard</text:p>
        </text:list-item>
      </text:list>
      <text:h text:style-name="P356" text:outline-level="3"><text:span text:style-name="T357">Data Separation</text:span></text:h>
      <text:list text:style-name="LFO4" text:continue-numbering="true">
        <text:list-item>
          <text:p text:style-name="P358">No candidate data shared</text:p>
        </text:list-item>
        <text:list-item>
          <text:p text:style-name="P359">No hiring workflows in CRM</text:p>
        </text:list-item>
        <text:list-item>
          <text:p text:style-name="P360">Business data only</text:p>
        </text:list-item>
      </text:list>
      <text:h text:style-name="P361" text:outline-level="3"><text:span text:style-name="T362">Business Value</text:span></text:h>
      <text:list text:style-name="LFO3" text:continue-numbering="true">
        <text:list-item>
          <text:p text:style-name="P363">Centralized SaaS sales management</text:p>
        </text:list-item>
        <text:list-item>
          <text:p text:style-name="P364">Better revenue tracking</text:p>
        </text:list-item>
        <text:list-item>
          <text:p text:style-name="P365">Strong customer relationship management</text:p>
        </text:list-item>
      </text:list>
      <text:p text:style-name="Normal"/>
      <text:h text:style-name="P366" text:outline-level="2"><text:span text:style-name="T367">5. System Architecture (High-Level)</text:span></text:h>
      <text:p text:style-name="P368"><text:span text:style-name="T369">Frontend (Web Application)</text:span><text:line-break/><text:span text:style-name="T370"><text:s/>→ Backend API (Multi-Tenant)</text:span><text:line-break/><text:span text:style-name="T371"><text:s/>→ Core Services (Auth, Jobs, ATS, Billing)</text:span><text:line-break/><text:span text:style-name="T372"><text:s/>→ Database (Tenant-Isolated)</text:span><text:line-break/><text:span text:style-name="T373"><text:s/>→ Cloud Storage (Resumes)</text:span><text:line-break/><text:span text:style-name="T374"><text:s/>→ Zoho CRM API (Super Admin only)</text:span></text:p>
      <text:p text:style-name="Normal"/>
      <text:h text:style-name="P375" text:outline-level="2"><text:span text:style-name="T376">6. Deliverables</text:span></text:h>
      <text:list text:style-name="LFO2" text:continue-numbering="true">
        <text:list-item>
          <text:p text:style-name="P377">Fully functional SaaS web application</text:p>
        </text:list-item>
        <text:list-item>
          <text:p text:style-name="P378">Admin and Super Admin dashboards</text:p>
        </text:list-item>
        <text:list-item>
          <text:p text:style-name="P379">Zoho CRM integration</text:p>
        </text:list-item>
        <text:list-item>
          <text:p text:style-name="P380">API documentation</text:p>
        </text:list-item>
        <text:list-item>
          <text:p text:style-name="P381">Database schema</text:p>
        </text:list-item>
        <text:list-item>
          <text:p text:style-name="P382">Deployment setup</text:p>
        </text:list-item>
        <text:list-item>
          <text:p text:style-name="P383">Basic user documentation</text:p>
        </text:list-item>
      </text:list>
      <text:p text:style-name="Normal"/>
      <text:h text:style-name="P384" text:outline-level="2"><text:span text:style-name="T385">7. Assumptions</text:span></text:h>
      <text:list text:style-name="LFO1" text:continue-numbering="true">
        <text:list-item>
          <text:p text:style-name="P386">Client provides timely feedback</text:p>
        </text:list-item>
        <text:list-item>
          <text:p text:style-name="P387">Third-party service costs excluded</text:p>
        </text:list-item>
        <text:list-item>
          <text:p text:style-name="P388">Scope changes require written approval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Symbol"/>
    </style:style>
    <style:style style:name="WW_CharLFO40LVL2" style:family="text">
      <style:text-properties style:font-name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/>
    </style:style>
    <style:style style:name="WW_CharLFO40LVL9" style:family="text">
      <style:text-properties style:font-name="Wingdings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/>
    </style:style>
    <style:style style:name="WW_CharLFO41LVL9" style:family="text">
      <style:text-properties style:font-name="Wingdings"/>
    </style:style>
    <style:style style:name="WW_CharLFO42LVL1" style:family="text">
      <style:text-properties style:font-name="Symbol"/>
    </style:style>
    <style:style style:name="WW_CharLFO42LVL2" style:family="text">
      <style:text-properties style:font-name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/>
    </style:style>
    <style:style style:name="WW_CharLFO42LVL9" style:family="text">
      <style:text-properties style:font-name="Wingdings"/>
    </style:style>
    <style:style style:name="WW_CharLFO43LVL1" style:family="text">
      <style:text-properties style:font-name="Symbol"/>
    </style:style>
    <style:style style:name="WW_CharLFO43LVL2" style:family="text">
      <style:text-properties style:font-name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/>
    </style:style>
    <style:style style:name="WW_CharLFO4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itesh choudhary</meta:initial-creator>
    <dc:creator>hitesh choudhary</dc:creator>
    <meta:creation-date>2026-01-10T04:48:00Z</meta:creation-date>
    <dc:date>2026-01-10T04:48:00Z</dc:date>
    <meta:template xlink:href="Normal.dotm" xlink:type="simple"/>
    <meta:editing-cycles>1</meta:editing-cycles>
    <meta:editing-duration>PT0S</meta:editing-duration>
    <meta:document-statistic meta:page-count="1" meta:paragraph-count="13" meta:word-count="975" meta:character-count="6526" meta:row-count="46" meta:non-whitespace-character-count="5564"/>
  </office:meta>
</office:document-meta>
</file>